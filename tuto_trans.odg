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D40000033788A13D97175EA5B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649cm" svg:x="1.045cm" svg:y="8.538cm">
          <draw:image xlink:href="Pictures/10000001000004D40000033788A13D97175EA5B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4-20T14:27:44.769586101</meta:creation-date>
    <dc:date>2026-04-20T14:27:58.781292302</dc:date>
    <meta:editing-duration>PT14S</meta:editing-duration>
    <meta:editing-cycles>1</meta:editing-cycles>
    <meta:document-statistic meta:object-count="1"/>
    <meta:generator>LibreOffice/7.3.7.2$Linux_X86_64 LibreOffice_project/30$Build-2</meta:generator>
  </office:meta>
</office:document-meta>
</file>